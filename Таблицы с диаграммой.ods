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3.394cm"/>
    </style:style>
    <style:style style:name="co5" style:family="table-column">
      <style:table-column-properties fo:break-before="auto" style:column-width="2.683cm"/>
    </style:style>
    <style:style style:name="co6" style:family="table-column">
      <style:table-column-properties fo:break-before="auto" style:column-width="4.708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919cm"/>
    </style:style>
    <style:style style:name="co9" style:family="table-column">
      <style:table-column-properties fo:break-before="auto" style:column-width="2.972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Максимальный показатель</text:p>
          </table:table-cell>
          <table:table-cell office:value-type="string" calcext:value-type="string">
            <text:p>Сумм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2^([.A2]+1)-1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2^([.A3]+1)-1"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2^([.A4]+1)-1"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2^([.A5]+1)-1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2^([.A6]+1)-1" office:value-type="float" office:value="31" calcext:value-type="float">
            <text:p>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2^([.A7]+1)-1" office:value-type="float" office:value="63" calcext:value-type="float">
            <text:p>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2^([.A8]+1)-1"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2^([.A9]+1)-1" office:value-type="float" office:value="255" calcext:value-type="float">
            <text:p>2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^([.A10]+1)-1" office:value-type="float" office:value="511" calcext:value-type="float">
            <text:p>51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2^([.A11]+1)-1" office:value-type="float" office:value="1023" calcext:value-type="float">
            <text:p>10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2^([.A12]+1)-1" office:value-type="float" office:value="2047" calcext:value-type="float">
            <text:p>20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2^([.A13]+1)-1" office:value-type="float" office:value="4095" calcext:value-type="float">
            <text:p>409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2^([.A14]+1)-1" office:value-type="float" office:value="8191" calcext:value-type="float">
            <text:p>819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2^([.A15]+1)-1" office:value-type="float" office:value="16383" calcext:value-type="float">
            <text:p>1638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2^([.A16]+1)-1" office:value-type="float" office:value="32767" calcext:value-type="float">
            <text:p>3276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2^([.A17]+1)-1" office:value-type="float" office:value="65535" calcext:value-type="float">
            <text:p>6553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2^([.A18]+1)-1" office:value-type="float" office:value="131071" calcext:value-type="float">
            <text:p>13107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2^([.A19]+1)-1" office:value-type="float" office:value="262143" calcext:value-type="float">
            <text:p>26214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2^([.A20]+1)-1" office:value-type="float" office:value="524287" calcext:value-type="float">
            <text:p>52428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2^([.A21]+1)-1" office:value-type="float" office:value="1048575" calcext:value-type="float">
            <text:p>104857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2^([.A22]+1)-1" office:value-type="float" office:value="2097151" calcext:value-type="float">
            <text:p>209715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2^([.A23]+1)-1" office:value-type="float" office:value="4194303" calcext:value-type="float">
            <text:p>419430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2^([.A24]+1)-1" office:value-type="float" office:value="8388607" calcext:value-type="float">
            <text:p>838860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2^([.A25]+1)-1" office:value-type="float" office:value="16777215" calcext:value-type="float">
            <text:p>16777215</text:p>
          </table:table-cell>
        </table:table-row>
        <table:table-row table:style-name="ro2" table:number-rows-repeated="104855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Лист2" table:style-name="ta2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Максимальный показатель </text:p>
          </table:table-cell>
          <table:table-cell office:value-type="string" calcext:value-type="string">
            <text:p>Сумм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+3^[.A3]"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+3^[.A4]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+3^[.A5]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+3^[.A6]"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+3^[.A7]"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+3^[.A8]"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+3^[.A9]" office:value-type="float" office:value="3280" calcext:value-type="float">
            <text:p>32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+3^[.A10]" office:value-type="float" office:value="9841" calcext:value-type="float">
            <text:p>98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+3^[.A11]" office:value-type="float" office:value="29524" calcext:value-type="float">
            <text:p>295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+3^[.A12]" office:value-type="float" office:value="88573" calcext:value-type="float">
            <text:p>8857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+3^[.A13]" office:value-type="float" office:value="265720" calcext:value-type="float">
            <text:p>2657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+3^[.A14]" office:value-type="float" office:value="797161" calcext:value-type="float">
            <text:p>7971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+3^[.A15]" office:value-type="float" office:value="2391484" calcext:value-type="float">
            <text:p>23914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+3^[.A16]" office:value-type="float" office:value="7174453" calcext:value-type="float">
            <text:p>71744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+3^[.A17]" office:value-type="float" office:value="21523360" calcext:value-type="float">
            <text:p>2152336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+3^[.A18]" office:value-type="float" office:value="64570081" calcext:value-type="float">
            <text:p>6457008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+3^[.A19]" office:value-type="float" office:value="193710244" calcext:value-type="float">
            <text:p>1937102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+3^[.A20]" office:value-type="float" office:value="581130733" calcext:value-type="float">
            <text:p>58113073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+3^[.A21]" office:value-type="float" office:value="1743392200" calcext:value-type="float">
            <text:p>17433922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+3^[.A22]" office:value-type="float" office:value="5230176601" calcext:value-type="float">
            <text:p>523017660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2]+3^[.A23]" office:value-type="float" office:value="15690529804" calcext:value-type="float">
            <text:p>1569052980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3]+3^[.A24]" office:value-type="float" office:value="47071589413" calcext:value-type="float">
            <text:p>4707158941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4]+3^[.A25]" office:value-type="float" office:value="141214768240" calcext:value-type="float">
            <text:p>141214768240</text:p>
          </table:table-cell>
        </table:table-row>
      </table:table>
      <table:table table:name="Лист3" table:style-name="ta2"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Максимальный показатель</text:p>
          </table:table-cell>
          <table:table-cell office:value-type="string" calcext:value-type="string">
            <text:p>Сумма для 2</text:p>
          </table:table-cell>
          <table:table-cell office:value-type="string" calcext:value-type="string">
            <text:p>Сумма для 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=VLOOKUP([.A2]; [$Лист1.$A$2:.$B$25]; 2; 0)" office:value-type="float" office:value="1" calcext:value-type="float">
            <text:p>1</text:p>
          </table:table-cell>
          <table:table-cell table:formula="of:==VLOOKUP([.A2]; [$Лист2.$A$2:.$B$25]; 2; 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=VLOOKUP([.A3]; [$Лист1.$A$2:.$B$25]; 2; 0)" office:value-type="float" office:value="3" calcext:value-type="float">
            <text:p>3</text:p>
          </table:table-cell>
          <table:table-cell table:formula="of:==VLOOKUP([.A3]; [$Лист2.$A$2:.$B$25]; 2; 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=VLOOKUP([.A4]; [$Лист1.$A$2:.$B$25]; 2; 0)" office:value-type="float" office:value="7" calcext:value-type="float">
            <text:p>7</text:p>
          </table:table-cell>
          <table:table-cell table:formula="of:==VLOOKUP([.A4]; [$Лист2.$A$2:.$B$25]; 2; 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=VLOOKUP([.A5]; [$Лист1.$A$2:.$B$25]; 2; 0)" office:value-type="float" office:value="15" calcext:value-type="float">
            <text:p>15</text:p>
          </table:table-cell>
          <table:table-cell table:formula="of:==VLOOKUP([.A5]; [$Лист2.$A$2:.$B$25]; 2; 0)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=VLOOKUP([.A6]; [$Лист1.$A$2:.$B$25]; 2; 0)" office:value-type="float" office:value="31" calcext:value-type="float">
            <text:p>31</text:p>
          </table:table-cell>
          <table:table-cell table:formula="of:==VLOOKUP([.A6]; [$Лист2.$A$2:.$B$25]; 2; 0)"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=VLOOKUP([.A7]; [$Лист1.$A$2:.$B$25]; 2; 0)" office:value-type="float" office:value="63" calcext:value-type="float">
            <text:p>63</text:p>
          </table:table-cell>
          <table:table-cell table:formula="of:==VLOOKUP([.A7]; [$Лист2.$A$2:.$B$25]; 2; 0)"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=VLOOKUP([.A8]; [$Лист1.$A$2:.$B$25]; 2; 0)" office:value-type="float" office:value="127" calcext:value-type="float">
            <text:p>127</text:p>
          </table:table-cell>
          <table:table-cell table:formula="of:==VLOOKUP([.A8]; [$Лист2.$A$2:.$B$25]; 2; 0)"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=VLOOKUP([.A9]; [$Лист1.$A$2:.$B$25]; 2; 0)" office:value-type="float" office:value="255" calcext:value-type="float">
            <text:p>255</text:p>
          </table:table-cell>
          <table:table-cell table:formula="of:==VLOOKUP([.A9]; [$Лист2.$A$2:.$B$25]; 2; 0)" office:value-type="float" office:value="3280" calcext:value-type="float">
            <text:p>32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=VLOOKUP([.A10]; [$Лист1.$A$2:.$B$25]; 2; 0)" office:value-type="float" office:value="511" calcext:value-type="float">
            <text:p>511</text:p>
          </table:table-cell>
          <table:table-cell table:formula="of:==VLOOKUP([.A10]; [$Лист2.$A$2:.$B$25]; 2; 0)" office:value-type="float" office:value="9841" calcext:value-type="float">
            <text:p>98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=VLOOKUP([.A11]; [$Лист1.$A$2:.$B$25]; 2; 0)" office:value-type="float" office:value="1023" calcext:value-type="float">
            <text:p>1023</text:p>
          </table:table-cell>
          <table:table-cell table:formula="of:==VLOOKUP([.A11]; [$Лист2.$A$2:.$B$25]; 2; 0)" office:value-type="float" office:value="29524" calcext:value-type="float">
            <text:p>295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=VLOOKUP([.A12]; [$Лист1.$A$2:.$B$25]; 2; 0)" office:value-type="float" office:value="2047" calcext:value-type="float">
            <text:p>2047</text:p>
          </table:table-cell>
          <table:table-cell table:formula="of:==VLOOKUP([.A12]; [$Лист2.$A$2:.$B$25]; 2; 0)" office:value-type="float" office:value="88573" calcext:value-type="float">
            <text:p>8857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=VLOOKUP([.A13]; [$Лист1.$A$2:.$B$25]; 2; 0)" office:value-type="float" office:value="4095" calcext:value-type="float">
            <text:p>4095</text:p>
          </table:table-cell>
          <table:table-cell table:formula="of:==VLOOKUP([.A13]; [$Лист2.$A$2:.$B$25]; 2; 0)" office:value-type="float" office:value="265720" calcext:value-type="float">
            <text:p>2657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=VLOOKUP([.A14]; [$Лист1.$A$2:.$B$25]; 2; 0)" office:value-type="float" office:value="8191" calcext:value-type="float">
            <text:p>8191</text:p>
          </table:table-cell>
          <table:table-cell table:formula="of:==VLOOKUP([.A14]; [$Лист2.$A$2:.$B$25]; 2; 0)" office:value-type="float" office:value="797161" calcext:value-type="float">
            <text:p>7971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=VLOOKUP([.A15]; [$Лист1.$A$2:.$B$25]; 2; 0)" office:value-type="float" office:value="16383" calcext:value-type="float">
            <text:p>16383</text:p>
          </table:table-cell>
          <table:table-cell table:formula="of:==VLOOKUP([.A15]; [$Лист2.$A$2:.$B$25]; 2; 0)" office:value-type="float" office:value="2391484" calcext:value-type="float">
            <text:p>23914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=VLOOKUP([.A16]; [$Лист1.$A$2:.$B$25]; 2; 0)" office:value-type="float" office:value="32767" calcext:value-type="float">
            <text:p>32767</text:p>
          </table:table-cell>
          <table:table-cell table:formula="of:==VLOOKUP([.A16]; [$Лист2.$A$2:.$B$25]; 2; 0)" office:value-type="float" office:value="7174453" calcext:value-type="float">
            <text:p>71744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=VLOOKUP([.A17]; [$Лист1.$A$2:.$B$25]; 2; 0)" office:value-type="float" office:value="65535" calcext:value-type="float">
            <text:p>65535</text:p>
          </table:table-cell>
          <table:table-cell table:formula="of:==VLOOKUP([.A17]; [$Лист2.$A$2:.$B$25]; 2; 0)" office:value-type="float" office:value="21523360" calcext:value-type="float">
            <text:p>2152336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=VLOOKUP([.A18]; [$Лист1.$A$2:.$B$25]; 2; 0)" office:value-type="float" office:value="131071" calcext:value-type="float">
            <text:p>131071</text:p>
          </table:table-cell>
          <table:table-cell table:formula="of:==VLOOKUP([.A18]; [$Лист2.$A$2:.$B$25]; 2; 0)" office:value-type="float" office:value="64570081" calcext:value-type="float">
            <text:p>6457008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=VLOOKUP([.A19]; [$Лист1.$A$2:.$B$25]; 2; 0)" office:value-type="float" office:value="262143" calcext:value-type="float">
            <text:p>262143</text:p>
          </table:table-cell>
          <table:table-cell table:formula="of:==VLOOKUP([.A19]; [$Лист2.$A$2:.$B$25]; 2; 0)" office:value-type="float" office:value="193710244" calcext:value-type="float">
            <text:p>1937102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=VLOOKUP([.A20]; [$Лист1.$A$2:.$B$25]; 2; 0)" office:value-type="float" office:value="524287" calcext:value-type="float">
            <text:p>524287</text:p>
          </table:table-cell>
          <table:table-cell table:formula="of:==VLOOKUP([.A20]; [$Лист2.$A$2:.$B$25]; 2; 0)" office:value-type="float" office:value="581130733" calcext:value-type="float">
            <text:p>58113073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=VLOOKUP([.A21]; [$Лист1.$A$2:.$B$25]; 2; 0)" office:value-type="float" office:value="1048575" calcext:value-type="float">
            <text:p>1048575</text:p>
          </table:table-cell>
          <table:table-cell table:formula="of:==VLOOKUP([.A21]; [$Лист2.$A$2:.$B$25]; 2; 0)" office:value-type="float" office:value="1743392200" calcext:value-type="float">
            <text:p>17433922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=VLOOKUP([.A22]; [$Лист1.$A$2:.$B$25]; 2; 0)" office:value-type="float" office:value="2097151" calcext:value-type="float">
            <text:p>2097151</text:p>
          </table:table-cell>
          <table:table-cell table:formula="of:==VLOOKUP([.A22]; [$Лист2.$A$2:.$B$25]; 2; 0)" office:value-type="float" office:value="5230176601" calcext:value-type="float">
            <text:p>523017660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=VLOOKUP([.A23]; [$Лист1.$A$2:.$B$25]; 2; 0)" office:value-type="float" office:value="4194303" calcext:value-type="float">
            <text:p>4194303</text:p>
          </table:table-cell>
          <table:table-cell table:formula="of:==VLOOKUP([.A23]; [$Лист2.$A$2:.$B$25]; 2; 0)" office:value-type="float" office:value="15690529804" calcext:value-type="float">
            <text:p>1569052980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=VLOOKUP([.A24]; [$Лист1.$A$2:.$B$25]; 2; 0)" office:value-type="float" office:value="8388607" calcext:value-type="float">
            <text:p>8388607</text:p>
          </table:table-cell>
          <table:table-cell table:formula="of:==VLOOKUP([.A24]; [$Лист2.$A$2:.$B$25]; 2; 0)" office:value-type="float" office:value="47071589413" calcext:value-type="float">
            <text:p>4707158941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=VLOOKUP([.A25]; [$Лист1.$A$2:.$B$25]; 2; 0)" office:value-type="float" office:value="16777215" calcext:value-type="float">
            <text:p>16777215</text:p>
          </table:table-cell>
          <table:table-cell table:formula="of:==VLOOKUP([.A25]; [$Лист2.$A$2:.$B$25]; 2; 0)" office:value-type="float" office:value="141214768240" calcext:value-type="float">
            <text:p>141214768240</text:p>
          </table:table-cell>
        </table:table-row>
      </table:table>
      <table:table table:name="Лист4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office:value-type="string" calcext:value-type="string">
            <text:p>Статистическая функция</text:p>
          </table:table-cell>
          <table:table-cell office:value-type="string" calcext:value-type="string">
            <text:p>Для А (Лист 3)</text:p>
          </table:table-cell>
          <table:table-cell office:value-type="string" calcext:value-type="string">
            <text:p>Для В (Лист 3)</text:p>
          </table:table-cell>
          <table:table-cell office:value-type="string" calcext:value-type="string">
            <text:p>Для С (Лист 3)</text:p>
          </table:table-cell>
        </table:table-row>
        <table:table-row table:style-name="ro2">
          <table:table-cell office:value-type="string" calcext:value-type="string">
            <text:p>Среднее значение</text:p>
          </table:table-cell>
          <table:table-cell table:formula="of:=AVERAGE([$Лист3.A2:.A25])" office:value-type="float" office:value="11.5" calcext:value-type="float">
            <text:p>11,5</text:p>
          </table:table-cell>
          <table:table-cell table:formula="of:=AVERAGE([$Лист3.B2:.B25])" office:value-type="float" office:value="1398100.25" calcext:value-type="float">
            <text:p>1398100,25</text:p>
          </table:table-cell>
          <table:table-cell table:formula="of:=AVERAGE([$Лист3.C2:.C25])" office:value-type="float" office:value="8825923014.5" calcext:value-type="float">
            <text:p>8825923014,5</text:p>
          </table:table-cell>
        </table:table-row>
        <table:table-row table:style-name="ro2">
          <table:table-cell office:value-type="string" calcext:value-type="string">
            <text:p>Максимальное значение</text:p>
          </table:table-cell>
          <table:table-cell table:formula="of:=AVERAGE([$Лист3.A3:.A26])" office:value-type="float" office:value="12" calcext:value-type="float">
            <text:p>12</text:p>
          </table:table-cell>
          <table:table-cell table:formula="of:=AVERAGE([$Лист3.B3:.B26])" office:value-type="float" office:value="1458887.17391304" calcext:value-type="float">
            <text:p>1458887,17391304</text:p>
          </table:table-cell>
          <table:table-cell table:formula="of:=AVERAGE([$Лист3.C3:.C26])" office:value-type="float" office:value="9209658797.69565" calcext:value-type="float">
            <text:p>9209658797,69565</text:p>
          </table:table-cell>
        </table:table-row>
        <table:table-row table:style-name="ro2">
          <table:table-cell office:value-type="string" calcext:value-type="string">
            <text:p>Минимальное значение</text:p>
          </table:table-cell>
          <table:table-cell table:formula="of:=AVERAGE([$Лист3.A4:.A27])" office:value-type="float" office:value="12.5" calcext:value-type="float">
            <text:p>12,5</text:p>
          </table:table-cell>
          <table:table-cell table:formula="of:=AVERAGE([$Лист3.B4:.B27])" office:value-type="float" office:value="1525200.09090909" calcext:value-type="float">
            <text:p>1525200,09090909</text:p>
          </table:table-cell>
          <table:table-cell table:formula="of:=AVERAGE([$Лист3.C4:.C27])" office:value-type="float" office:value="9628279651.95455" calcext:value-type="float">
            <text:p>9628279651,95455</text:p>
          </table:table-cell>
        </table:table-row>
        <table:table-row table:style-name="ro2">
          <table:table-cell office:value-type="string" calcext:value-type="string">
            <text:p>Медиана</text:p>
          </table:table-cell>
          <table:table-cell table:formula="of:=AVERAGE([$Лист3.A5:.A28])" office:value-type="float" office:value="13" calcext:value-type="float">
            <text:p>13</text:p>
          </table:table-cell>
          <table:table-cell table:formula="of:=AVERAGE([$Лист3.B5:.B28])" office:value-type="float" office:value="1597828.33333333" calcext:value-type="float">
            <text:p>1597828,33333333</text:p>
          </table:table-cell>
          <table:table-cell table:formula="of:=AVERAGE([$Лист3.C5:.C28])" office:value-type="float" office:value="10086769158.5714" calcext:value-type="float">
            <text:p>10086769158,5714</text:p>
          </table:table-cell>
        </table:table-row>
        <table:table-row table:style-name="ro2">
          <table:table-cell office:value-type="string" calcext:value-type="string">
            <text:p>Мода</text:p>
          </table:table-cell>
          <table:table-cell table:formula="of:=AVERAGE([$Лист3.A6:.A29])" office:value-type="float" office:value="13.5" calcext:value-type="float">
            <text:p>13,5</text:p>
          </table:table-cell>
          <table:table-cell table:formula="of:=AVERAGE([$Лист3.B6:.B29])" office:value-type="float" office:value="1677719" calcext:value-type="float">
            <text:p>1677719</text:p>
          </table:table-cell>
          <table:table-cell table:formula="of:=AVERAGE([$Лист3.C6:.C29])" office:value-type="float" office:value="10591107614.5" calcext:value-type="float">
            <text:p>10591107614,5</text:p>
          </table:table-cell>
        </table:table-row>
        <table:table-row table:style-name="ro2">
          <table:table-cell office:value-type="string" calcext:value-type="string">
            <text:p>Дисперсия</text:p>
          </table:table-cell>
          <table:table-cell table:formula="of:=AVERAGE([$Лист3.A7:.A30])" office:value-type="float" office:value="14" calcext:value-type="float">
            <text:p>14</text:p>
          </table:table-cell>
          <table:table-cell table:formula="of:=AVERAGE([$Лист3.B7:.B30])" office:value-type="float" office:value="1766018.36842105" calcext:value-type="float">
            <text:p>1766018,36842105</text:p>
          </table:table-cell>
          <table:table-cell table:formula="of:=AVERAGE([$Лист3.C7:.C30])" office:value-type="float" office:value="11148534324.6842" calcext:value-type="float">
            <text:p>11148534324,6842</text:p>
          </table:table-cell>
        </table:table-row>
      </table:table>
      <table:table table:name="Лист5" table:style-name="ta2">
        <table:shapes>
          <draw:frame draw:z-index="0" draw:style-name="gr1" draw:text-style-name="P1" svg:width="15.999cm" svg:height="8.999cm" svg:x="18.163cm" svg:y="0.1cm">
            <draw:object draw:notify-on-update-of-ranges="Лист5.A1:Лист5.A5 Лист5.B1:Лист5.B5 Лист5.C1:Лист5.C5 Лист5.D1:Лист5.D5 Лист5.E1:Лист5.E5 Лист5.F1:Лист5.F5 Лист5.G1:Лист5.G5 Лист5.H1:Лист5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3">
          <table:table-cell/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</table:table-row>
        <table:table-row table:style-name="ro2">
          <table:table-cell office:value-type="string" calcext:value-type="string">
            <text:p>Колледж 1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2236476" calcext:value-type="float">
            <text:p>2236476</text:p>
          </table:table-cell>
          <table:table-cell office:value-type="float" office:value="1934765" calcext:value-type="float">
            <text:p>1934765</text:p>
          </table:table-cell>
          <table:table-cell office:value-type="float" office:value="4543534" calcext:value-type="float">
            <text:p>4543534</text:p>
          </table:table-cell>
          <table:table-cell office:value-type="float" office:value="2348887" calcext:value-type="float">
            <text:p>2348887</text:p>
          </table:table-cell>
          <table:table-cell office:value-type="float" office:value="1170004" calcext:value-type="float">
            <text:p>1170004</text:p>
          </table:table-cell>
          <table:table-cell office:value-type="float" office:value="2344598" calcext:value-type="float">
            <text:p>2344598</text:p>
          </table:table-cell>
        </table:table-row>
        <table:table-row table:style-name="ro2">
          <table:table-cell office:value-type="string" calcext:value-type="string">
            <text:p>Колледж 2</text:p>
          </table:table-cell>
          <table:table-cell office:value-type="float" office:value="237800" calcext:value-type="float">
            <text:p>237800</text:p>
          </table:table-cell>
          <table:table-cell office:value-type="float" office:value="732647" calcext:value-type="float">
            <text:p>732647</text:p>
          </table:table-cell>
          <table:table-cell office:value-type="float" office:value="567672" calcext:value-type="float">
            <text:p>567672</text:p>
          </table:table-cell>
          <table:table-cell office:value-type="float" office:value="234234" calcext:value-type="float">
            <text:p>234234</text:p>
          </table:table-cell>
          <table:table-cell office:value-type="float" office:value="323217" calcext:value-type="float">
            <text:p>323217</text:p>
          </table:table-cell>
          <table:table-cell office:value-type="float" office:value="634423" calcext:value-type="float">
            <text:p>634423</text:p>
          </table:table-cell>
          <table:table-cell office:value-type="float" office:value="235455" calcext:value-type="float">
            <text:p>235455</text:p>
          </table:table-cell>
        </table:table-row>
        <table:table-row table:style-name="ro2">
          <table:table-cell office:value-type="string" calcext:value-type="string">
            <text:p>Колледж 3</text:p>
          </table:table-cell>
          <table:table-cell office:value-type="float" office:value="3211400" calcext:value-type="float">
            <text:p>3211400</text:p>
          </table:table-cell>
          <table:table-cell office:value-type="float" office:value="4873837" calcext:value-type="float">
            <text:p>4873837</text:p>
          </table:table-cell>
          <table:table-cell office:value-type="float" office:value="3654654" calcext:value-type="float">
            <text:p>3654654</text:p>
          </table:table-cell>
          <table:table-cell office:value-type="float" office:value="3453453" calcext:value-type="float">
            <text:p>3453453</text:p>
          </table:table-cell>
          <table:table-cell office:value-type="float" office:value="5435323" calcext:value-type="float">
            <text:p>5435323</text:p>
          </table:table-cell>
          <table:table-cell office:value-type="float" office:value="4586959" calcext:value-type="float">
            <text:p>4586959</text:p>
          </table:table-cell>
          <table:table-cell office:value-type="float" office:value="8576885" calcext:value-type="float">
            <text:p>8576885</text:p>
          </table:table-cell>
        </table:table-row>
        <table:table-row table:style-name="ro2">
          <table:table-cell office:value-type="string" calcext:value-type="string">
            <text:p>Колледж 4</text:p>
          </table:table-cell>
          <table:table-cell office:value-type="float" office:value="4961201" calcext:value-type="float">
            <text:p>4961201</text:p>
          </table:table-cell>
          <table:table-cell office:value-type="float" office:value="7844962" calcext:value-type="float">
            <text:p>7844962</text:p>
          </table:table-cell>
          <table:table-cell office:value-type="float" office:value="6159094" calcext:value-type="float">
            <text:p>6159094</text:p>
          </table:table-cell>
          <table:table-cell office:value-type="float" office:value="8233225" calcext:value-type="float">
            <text:p>8233225</text:p>
          </table:table-cell>
          <table:table-cell office:value-type="float" office:value="8109432" calcext:value-type="float">
            <text:p>8109432</text:p>
          </table:table-cell>
          <table:table-cell office:value-type="float" office:value="6393392" calcext:value-type="float">
            <text:p>6393392</text:p>
          </table:table-cell>
          <table:table-cell office:value-type="float" office:value="11158945" calcext:value-type="float">
            <text:p>11158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.00.0000</text:date>, <text:time style:data-style-name="N2" text:time-value="10:45:41.46176690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0:45:41.661238310</meta:creation-date>
    <dc:title>Таблица</dc:title>
    <meta:generator>LibreOffice/25.2.6.2$Linux_X86_64 LibreOffice_project/520$Build-2</meta:generator>
    <meta:editing-duration>PT3M14S</meta:editing-duration>
    <meta:editing-cycles>2</meta:editing-cycles>
    <dc:date>2026-05-21T12:18:08.257482155</dc:date>
    <meta:document-statistic meta:table-count="5" meta:cell-count="242" meta:object-count="1"/>
    <meta:template xlink:type="simple" xlink:actuate="onRequest" xlink:title="Таблица" xlink:href="../../../../../usr/lib/libreoffice/share/template/common/ШАБЛОН_ЭЛЕКТРОННОЙ_ТАБЛИЦЫ_2019-07-22.ots" meta:date="2026-05-21T10:45:41.53162286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2.707cm" style:legend-expansion="high" chart:style-name="ch2"/>
        <chart:plot-area chart:style-name="ch3" svg:x="0.32cm" svg:y="0.18cm" svg:width="12.27cm" svg:height="8.64cm">
          <chart:coordinate-region svg:x="2.101cm" svg:y="0.38cm" svg:width="9.636cm" svg:height="7.793cm"/>
          <chart:axis chart:dimension="x" chart:name="primary-x" chart:style-name="ch4" chartooo:axis-type="auto">
            <chartooo:date-scale/>
            <chart:categories table:cell-range-address="Лист5.A1:Лист5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5.B1:Лист5.B5" chart:class="chart:line">
            <chart:data-point chart:repeated="5"/>
          </chart:series>
          <chart:series chart:style-name="ch7" chart:values-cell-range-address="Лист5.C1:Лист5.C5" chart:class="chart:line">
            <chart:data-point chart:repeated="5"/>
          </chart:series>
          <chart:series chart:style-name="ch8" chart:values-cell-range-address="Лист5.D1:Лист5.D5" chart:class="chart:line">
            <chart:data-point chart:repeated="5"/>
          </chart:series>
          <chart:series chart:style-name="ch9" chart:values-cell-range-address="Лист5.E1:Лист5.E5" chart:class="chart:line">
            <chart:data-point chart:repeated="5"/>
          </chart:series>
          <chart:series chart:style-name="ch10" chart:values-cell-range-address="Лист5.F1:Лист5.F5" chart:class="chart:line">
            <chart:data-point chart:repeated="5"/>
          </chart:series>
          <chart:series chart:style-name="ch11" chart:values-cell-range-address="Лист5.G1:Лист5.G5" chart:class="chart:line">
            <chart:data-point chart:repeated="5"/>
          </chart:series>
          <chart:series chart:style-name="ch12" chart:values-cell-range-address="Лист5.H1:Лист5.H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Лист5.A1:Лист5.A5</svg:desc>
                </draw:g>
              </table:table-cell>
              <table:table-cell office:value-type="float" office:value="2021">
                <text:p>2021</text:p>
                <draw:g>
                  <svg:desc>Лист5.B1:Лист5.B5</svg:desc>
                </draw:g>
              </table:table-cell>
              <table:table-cell office:value-type="float" office:value="2022">
                <text:p>2022</text:p>
                <draw:g>
                  <svg:desc>Лист5.C1:Лист5.C5</svg:desc>
                </draw:g>
              </table:table-cell>
              <table:table-cell office:value-type="float" office:value="2023">
                <text:p>2023</text:p>
                <draw:g>
                  <svg:desc>Лист5.D1:Лист5.D5</svg:desc>
                </draw:g>
              </table:table-cell>
              <table:table-cell office:value-type="float" office:value="2024">
                <text:p>2024</text:p>
                <draw:g>
                  <svg:desc>Лист5.E1:Лист5.E5</svg:desc>
                </draw:g>
              </table:table-cell>
              <table:table-cell office:value-type="float" office:value="2025">
                <text:p>2025</text:p>
                <draw:g>
                  <svg:desc>Лист5.F1:Лист5.F5</svg:desc>
                </draw:g>
              </table:table-cell>
              <table:table-cell office:value-type="float" office:value="2026">
                <text:p>2026</text:p>
                <draw:g>
                  <svg:desc>Лист5.G1:Лист5.G5</svg:desc>
                </draw:g>
              </table:table-cell>
              <table:table-cell office:value-type="float" office:value="2027">
                <text:p>2027</text:p>
                <draw:g>
                  <svg:desc>Лист5.H1:Лист5.H5</svg:desc>
                </draw:g>
              </table:table-cell>
            </table:table-row>
            <table:table-row>
              <table:table-cell office:value-type="string">
                <text:p>Колледж 1</text:p>
              </table:table-cell>
              <table:table-cell office:value-type="float" office:value="1510000">
                <text:p>1510000</text:p>
              </table:table-cell>
              <table:table-cell office:value-type="float" office:value="2236476">
                <text:p>2236476</text:p>
              </table:table-cell>
              <table:table-cell office:value-type="float" office:value="1934765">
                <text:p>1934765</text:p>
              </table:table-cell>
              <table:table-cell office:value-type="float" office:value="4543534">
                <text:p>4543534</text:p>
              </table:table-cell>
              <table:table-cell office:value-type="float" office:value="2348887">
                <text:p>2348887</text:p>
              </table:table-cell>
              <table:table-cell office:value-type="float" office:value="1170004">
                <text:p>1170004</text:p>
              </table:table-cell>
              <table:table-cell office:value-type="float" office:value="2344598">
                <text:p>2344598</text:p>
              </table:table-cell>
            </table:table-row>
            <table:table-row>
              <table:table-cell office:value-type="string">
                <text:p>Колледж 2</text:p>
              </table:table-cell>
              <table:table-cell office:value-type="float" office:value="237800">
                <text:p>237800</text:p>
              </table:table-cell>
              <table:table-cell office:value-type="float" office:value="732647">
                <text:p>732647</text:p>
              </table:table-cell>
              <table:table-cell office:value-type="float" office:value="567672">
                <text:p>567672</text:p>
              </table:table-cell>
              <table:table-cell office:value-type="float" office:value="234234">
                <text:p>234234</text:p>
              </table:table-cell>
              <table:table-cell office:value-type="float" office:value="323217">
                <text:p>323217</text:p>
              </table:table-cell>
              <table:table-cell office:value-type="float" office:value="634423">
                <text:p>634423</text:p>
              </table:table-cell>
              <table:table-cell office:value-type="float" office:value="235455">
                <text:p>235455</text:p>
              </table:table-cell>
            </table:table-row>
            <table:table-row>
              <table:table-cell office:value-type="string">
                <text:p>Колледж 3</text:p>
              </table:table-cell>
              <table:table-cell office:value-type="float" office:value="3211400">
                <text:p>3211400</text:p>
              </table:table-cell>
              <table:table-cell office:value-type="float" office:value="4873837">
                <text:p>4873837</text:p>
              </table:table-cell>
              <table:table-cell office:value-type="float" office:value="3654654">
                <text:p>3654654</text:p>
              </table:table-cell>
              <table:table-cell office:value-type="float" office:value="3453453">
                <text:p>3453453</text:p>
              </table:table-cell>
              <table:table-cell office:value-type="float" office:value="5435323">
                <text:p>5435323</text:p>
              </table:table-cell>
              <table:table-cell office:value-type="float" office:value="4586959">
                <text:p>4586959</text:p>
              </table:table-cell>
              <table:table-cell office:value-type="float" office:value="8576885">
                <text:p>8576885</text:p>
              </table:table-cell>
            </table:table-row>
            <table:table-row>
              <table:table-cell office:value-type="string">
                <text:p>Колледж 4</text:p>
              </table:table-cell>
              <table:table-cell office:value-type="float" office:value="4961201">
                <text:p>4961201</text:p>
              </table:table-cell>
              <table:table-cell office:value-type="float" office:value="7844962">
                <text:p>7844962</text:p>
              </table:table-cell>
              <table:table-cell office:value-type="float" office:value="6159094">
                <text:p>6159094</text:p>
              </table:table-cell>
              <table:table-cell office:value-type="float" office:value="8233225">
                <text:p>8233225</text:p>
              </table:table-cell>
              <table:table-cell office:value-type="float" office:value="8109432">
                <text:p>8109432</text:p>
              </table:table-cell>
              <table:table-cell office:value-type="float" office:value="6393392">
                <text:p>6393392</text:p>
              </table:table-cell>
              <table:table-cell office:value-type="float" office:value="11158945">
                <text:p>11158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